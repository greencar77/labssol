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HashMap</text:span> in Java is <text:span text:style-name="Strong_20_Emphasis">not thread-safe</text:span> because it does not synchronize access to its internal data structures. When multiple threads read and write to the same <text:span text:style-name="Source_20_Text">HashMap</text:span> at the same time, race conditions and data corruption can occur.</text:p>
      <text:p text:style-name="Text_20_body">Here’s why:</text:p>
      <text:p text:style-name="Horizontal_20_Line"/>
      <text:h text:style-name="Heading_20_2" text:outline-level="2">1. Concurrent writes can corrupt internal structure</text:h>
      <text:p text:style-name="Text_20_body">A <text:span text:style-name="Source_20_Text">HashMap</text:span> stores data in buckets (array + linked lists / trees). During operations like:</text:p>
      <text:list text:style-name="L1">
        <text:list-item>
          <text:p text:style-name="P1"><text:span text:style-name="Source_20_Text">put()</text:span> </text:p>
        </text:list-item>
        <text:list-item>
          <text:p text:style-name="P1"><text:span text:style-name="Source_20_Text">resize()</text:span> </text:p>
        </text:list-item>
        <text:list-item>
          <text:p text:style-name="P2"><text:span text:style-name="Source_20_Text">rehash()</text:span> </text:p>
        </text:list-item>
      </text:list>
      <text:p text:style-name="Text_20_body">the internal structure changes.</text:p>
      <text:p text:style-name="Text_20_body">If two threads modify it simultaneously:</text:p>
      <text:section text:style-name="Sect1" text:name="code-block-viewer">
        <text:p text:style-name="P3"><text:span text:style-name="Source_20_Text">map.put("A", 1);</text:span></text:p>
        <text:p text:style-name="P4"><text:span text:style-name="Source_20_Text">map.put("B", 2);</text:span></text:p>
      </text:section>
      <text:p text:style-name="Text_20_body">they may:</text:p>
      <text:list text:style-name="L2">
        <text:list-item>
          <text:p text:style-name="P5">overwrite each other’s changes </text:p>
        </text:list-item>
        <text:list-item>
          <text:p text:style-name="P5">lose entries </text:p>
        </text:list-item>
        <text:list-item>
          <text:p text:style-name="P5">corrupt bucket links </text:p>
        </text:list-item>
        <text:list-item>
          <text:p text:style-name="P6">create inconsistent state </text:p>
        </text:list-item>
      </text:list>
      <text:p text:style-name="Text_20_body">because these operations are <text:span text:style-name="Strong_20_Emphasis">not atomic</text:span>.</text:p>
      <text:p text:style-name="Horizontal_20_Line"/>
      <text:h text:style-name="Heading_20_2" text:outline-level="2">2. Resize operation is especially dangerous</text:h>
      <text:p text:style-name="Text_20_body">When the map grows beyond capacity, it resizes and rehashes entries into a new table.</text:p>
      <text:p text:style-name="Text_20_body">If two threads resize at the same time:</text:p>
      <text:list text:style-name="L3">
        <text:list-item>
          <text:p text:style-name="P7">bucket chains can become cyclic </text:p>
        </text:list-item>
        <text:list-item>
          <text:p text:style-name="P7">traversal may enter an infinite loop </text:p>
        </text:list-item>
        <text:list-item>
          <text:p text:style-name="P8">CPU usage can spike to 100% </text:p>
        </text:list-item>
      </text:list>
      <text:p text:style-name="Text_20_body">This was a well-known issue in older JDKs.</text:p>
      <text:p text:style-name="Horizontal_20_Line"/>
      <text:h text:style-name="Heading_20_2" text:outline-level="2">3. No visibility guarantees</text:h>
      <text:p text:style-name="Text_20_body">Without synchronization:</text:p>
      <text:list text:style-name="L4">
        <text:list-item>
          <text:p text:style-name="P9"><text:soft-page-break/>one thread’s updates may not be visible to another thread immediately </text:p>
        </text:list-item>
        <text:list-item>
          <text:p text:style-name="P10">threads can see stale data </text:p>
        </text:list-item>
      </text:list>
      <text:p text:style-name="Text_20_body">Example:</text:p>
      <text:section text:style-name="Sect1" text:name="Section1">
        <text:p text:style-name="P3"><text:bookmark text:name="code-block-viewer"/><text:span text:style-name="Source_20_Text">Thread 1:</text:span></text:p>
        <text:p text:style-name="Preformatted_20_Text"><text:span text:style-name="Source_20_Text">map.put("x", 100);</text:span></text:p>
        <text:p text:style-name="Preformatted_20_Text"><text:span text:style-name="Source_20_Text">Thread 2:</text:span></text:p>
        <text:p text:style-name="P4"><text:span text:style-name="Source_20_Text">map.get("x"); // may still see null</text:span></text:p>
      </text:section>
      <text:p text:style-name="Text_20_body">because there’s no happens-before relationship.</text:p>
      <text:p text:style-name="Horizontal_20_Line"/>
      <text:h text:style-name="Heading_20_2" text:outline-level="2">4. Read operations are not always safe either</text:h>
      <text:p text:style-name="Text_20_body">People often assume:</text:p>
      <text:p text:style-name="Quotations">“Reads are safe if only one thread writes.”</text:p>
      <text:p text:style-name="Text_20_body">Not necessarily.</text:p>
      <text:p text:style-name="Text_20_body">A read during a concurrent resize/modification can observe partially updated state and behave unpredictably.</text:p>
      <text:p text:style-name="Horizontal_20_Line"/>
      <text:h text:style-name="Heading_20_1" text:outline-level="1">Example Problem</text:h>
      <text:section text:style-name="Sect1" text:name="Section2">
        <text:p text:style-name="P3"><text:bookmark text:name="code-block-viewer Copy 1"/><text:span text:style-name="Source_20_Text">HashMap&lt;Integer, String&gt; map = new HashMap&lt;&gt;();</text:span></text:p>
        <text:p text:style-name="Preformatted_20_Text"><text:span text:style-name="Source_20_Text">Thread t1 = new Thread(() -&gt; {</text:span></text:p>
        <text:p text:style-name="Preformatted_20_Text"><text:span text:style-name="Source_20_Text"><text:s text:c="4"/>for (int i = 0; i &lt; 1000; i++) {</text:span></text:p>
        <text:p text:style-name="Preformatted_20_Text"><text:span text:style-name="Source_20_Text"><text:s text:c="8"/>map.put(i, "A");</text:span></text:p>
        <text:p text:style-name="Preformatted_20_Text"><text:span text:style-name="Source_20_Text"><text:s text:c="4"/>}</text:span></text:p>
        <text:p text:style-name="Preformatted_20_Text"><text:span text:style-name="Source_20_Text">});</text:span></text:p>
        <text:p text:style-name="Preformatted_20_Text"><text:span text:style-name="Source_20_Text">Thread t2 = new Thread(() -&gt; {</text:span></text:p>
        <text:p text:style-name="Preformatted_20_Text"><text:span text:style-name="Source_20_Text"><text:s text:c="4"/>for (int i = 0; i &lt; 1000; i++) {</text:span></text:p>
        <text:p text:style-name="Preformatted_20_Text"><text:span text:style-name="Source_20_Text"><text:s text:c="8"/>map.put(i, "B");</text:span></text:p>
        <text:p text:style-name="Preformatted_20_Text"><text:span text:style-name="Source_20_Text"><text:s text:c="4"/>}</text:span></text:p>
        <text:p text:style-name="Preformatted_20_Text"><text:span text:style-name="Source_20_Text">});</text:span></text:p>
        <text:p text:style-name="Preformatted_20_Text"><text:span text:style-name="Source_20_Text">t1.start();</text:span></text:p>
        <text:p text:style-name="P4"><text:span text:style-name="Source_20_Text">t2.start();</text:span></text:p>
      </text:section>
      <text:p text:style-name="Text_20_body">Possible outcomes:</text:p>
      <text:list text:style-name="L5">
        <text:list-item>
          <text:p text:style-name="P11">missing entries </text:p>
        </text:list-item>
        <text:list-item>
          <text:p text:style-name="P11">corrupted data </text:p>
        </text:list-item>
        <text:list-item>
          <text:p text:style-name="P11">inconsistent map size </text:p>
        </text:list-item>
        <text:list-item>
          <text:p text:style-name="P12">infinite loops (older JDKs) </text:p>
        </text:list-item>
      </text:list>
      <text:p text:style-name="Horizontal_20_Line"/>
      <text:h text:style-name="Heading_20_1" text:outline-level="1"><text:soft-page-break/>Thread-safe Alternatives</text:h>
      <text:h text:style-name="Heading_20_2" text:outline-level="2"><text:span text:style-name="Source_20_Text">ConcurrentHashMap</text:span></text:h>
      <text:p text:style-name="Text_20_body">Best modern choice for concurrent access.</text:p>
      <text:section text:style-name="Sect1" text:name="Section3">
        <text:p text:style-name="P3"><text:bookmark text:name="code-block-viewer Copy 2"/><text:span text:style-name="Source_20_Text">ConcurrentHashMap&lt;Integer, String&gt; map =</text:span></text:p>
        <text:p text:style-name="P4"><text:span text:style-name="Source_20_Text"><text:s text:c="4"/>new ConcurrentHashMap&lt;&gt;();</text:span></text:p>
      </text:section>
      <text:p text:style-name="Text_20_body">Features:</text:p>
      <text:list text:style-name="L6">
        <text:list-item>
          <text:p text:style-name="P13">high concurrency </text:p>
        </text:list-item>
        <text:list-item>
          <text:p text:style-name="P13">segmented/lock-striping design (older JDKs) </text:p>
        </text:list-item>
        <text:list-item>
          <text:p text:style-name="P13">CAS + synchronized bins (modern JDKs) </text:p>
        </text:list-item>
        <text:list-item>
          <text:p text:style-name="P14">safe concurrent reads/writes </text:p>
        </text:list-item>
      </text:list>
      <text:p text:style-name="Horizontal_20_Line"/>
      <text:h text:style-name="Heading_20_2" text:outline-level="2"><text:span text:style-name="Source_20_Text">Collections.synchronizedMap</text:span></text:h>
      <text:section text:style-name="Sect1" text:name="Section4">
        <text:p text:style-name="P3"><text:bookmark text:name="code-block-viewer Copy 3"/><text:span text:style-name="Source_20_Text">Map&lt;K,V&gt; map =</text:span></text:p>
        <text:p text:style-name="P4"><text:span text:style-name="Source_20_Text"><text:s text:c="4"/>Collections.synchronizedMap(new HashMap&lt;&gt;());</text:span></text:p>
      </text:section>
      <text:p text:style-name="Text_20_body">This wraps the map with synchronized methods.</text:p>
      <text:p text:style-name="Text_20_body">Downside:</text:p>
      <text:list text:style-name="L7">
        <text:list-item>
          <text:p text:style-name="P15">one global lock </text:p>
        </text:list-item>
        <text:list-item>
          <text:p text:style-name="P16">lower scalability </text:p>
        </text:list-item>
      </text:list>
      <text:p text:style-name="Horizontal_20_Line"/>
      <text:h text:style-name="Heading_20_1" text:outline-level="1">Key Insight</text:h>
      <text:p text:style-name="Text_20_body"><text:span text:style-name="Source_20_Text">HashMap</text:span> prioritizes:</text:p>
      <text:list text:style-name="L8">
        <text:list-item>
          <text:p text:style-name="P17">speed </text:p>
        </text:list-item>
        <text:list-item>
          <text:p text:style-name="P18">low overhead </text:p>
        </text:list-item>
      </text:list>
      <text:p text:style-name="Text_20_body">not concurrency.</text:p>
      <text:p text:style-name="Text_20_body">Adding synchronization internally would slow down single-threaded performance, so Java provides separate concurrent collections inste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1T21:08:34.602084600</meta:creation-date>
    <dc:date>2026-06-11T21:09:48.152415400</dc:date>
    <meta:editing-duration>PT1M14S</meta:editing-duration>
    <meta:editing-cycles>1</meta:editing-cycles>
    <meta:document-statistic meta:table-count="0" meta:image-count="0" meta:object-count="0" meta:page-count="3" meta:paragraph-count="81" meta:word-count="391" meta:character-count="2529" meta:non-whitespace-character-count="2179"/>
    <meta:generator>LibreOffice/26.2.3.2$Windows_X86_64 LibreOffice_project/70e089b17412e4cb7773e41413306b17a2328c34</meta:generator>
  </office:meta>
</office:document-meta>
</file>